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72in" svg:height="3.5417in" svg:x="8.8724in" svg:y="6.7921in">
            <draw:object draw:notify-on-update-of-ranges="Sheet1.G48:Sheet1.G52 Sheet1.H48:Sheet1.H52 Sheet1.H48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32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2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table:number-columns-repeated="13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5:15:22.896802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  <dc:date>2026-05-17T16:18:03.367744138</dc:date>
    <meta:editing-duration>PT33M42S</meta:editing-duration>
    <meta:editing-cycles>3</meta:editing-cycles>
    <meta:document-statistic meta:table-count="1" meta:cell-count="2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H48:Sheet1.H52" chart:error-lower-range="Sheet1.H48:Sheet1.H52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48:Sheet1.H52" chart:error-lower-range="Sheet1.H48:Sheet1.H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48:Sheet1.H52" chart:error-lower-range="Sheet1.H48:Sheet1.H5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scatter" chart:style-name="ch1">
        <chart:plot-area chart:style-name="ch2" svg:x="0.319cm" svg:y="0.179cm" svg:width="15.358cm" svg:height="8.639cm">
          <chart:coordinate-region svg:x="1.239cm" svg:y="0.378cm" svg:width="14.197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48:Sheet1.G52" chart:class="chart:scatter">
            <chart:error-indicator chart:style-name="ch7" chart:dimension="y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744545454545">
                <text:p>1.47744545454545</text:p>
                <draw:g>
                  <svg:desc>Sheet1.G48:Sheet1.G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450769230769">
                <text:p>1.55450769230769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0.0254247337278107">
                <text:p>0.0254247337278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636363636364">
                <text:p>1.48636363636364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0.0120035123966942">
                <text:p>0.0120035123966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8037336683417">
                <text:p>1.48037336683417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0.00793202696901594">
                <text:p>0.00793202696901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058328267477">
                <text:p>1.49058328267477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0.00482882456740053">
                <text:p>0.00482882456740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