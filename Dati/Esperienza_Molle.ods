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BD62C733.svm" manifest:media-type="image/x-svm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ext-properties fo:font-size="25pt" style:font-size-asian="25pt" style:font-size-complex="25pt"/>
    </style:style>
    <style:style style:name="ce26" style:family="table-cell" style:parent-style-name="Default">
      <style:text-properties fo:color="#c9211e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vertical-align="botto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"/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7.2638in" svg:height="3.9933in" svg:x="8.7516in" svg:y="5.7783in">
            <draw:object draw:notify-on-update-of-ranges="Sheet1.D48:Sheet1.D52 Sheet1.E48:Sheet1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9732in" svg:height="3.9224in" svg:x="16.2551in" svg:y="5.8697in">
            <draw:object draw:notify-on-update-of-ranges="Sheet1.C48:Sheet1.C52 Sheet1.G48:Sheet1.G52 Sheet1.H48:Sheet1.H52 Sheet1.H48:Sheet1.H52 Sheet1.K59:Sheet1.K60 Sheet1.L59:Sheet1.L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3118in" svg:height="4.1126in" svg:x="23.8161in" svg:y="6.1461in">
            <draw:object draw:notify-on-update-of-ranges="Sheet1.D48:Sheet1.D52 Sheet1.B48:Sheet1.B52 Sheet1.A48:Sheet1.A52 Sheet1.A48:Sheet1.A52 Sheet1.K59:Sheet1.K60 Sheet1.M59:Sheet1.M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1.9984in" svg:y="10.5469in">
            <draw:object draw:notify-on-update-of-ranges="Sheet1.W66:Sheet1.W69 Sheet1.K72:Sheet1.K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6.2988in" svg:height="3.5429in" svg:x="8.8169in" svg:y="28.0409in">
            <draw:object draw:notify-on-update-of-ranges="Sheet1.B161:Sheet1.B165 Sheet1.D167:Sheet1.D1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number-columns-repeated="7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5"/>
          <table:table-cell table:style-name="ce2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isure massa errore +- 0.01 g</text:p>
          </table:table-cell>
          <table:covered-table-cell table:number-columns-repeated="2"/>
          <table:table-cell/>
          <table:table-cell table:style-name="ce43" office:value-type="string" calcext:value-type="string" table:number-columns-spanned="5" table:number-rows-spanned="1">
            <text:p>misura allungamento statica (solo piattino) massa Mp, errore 0.5mm</text:p>
          </table:table-cell>
          <table:covered-table-cell table:number-columns-repeated="4"/>
          <table:table-cell table:number-columns-repeated="5"/>
          <table:table-cell table:style-name="ce3"/>
          <table:table-cell/>
          <table:table-cell office:value-type="string" calcext:value-type="string">
            <text:p>L0 = lunghezza a riposo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number-columns-repeated="2"/>
          <table:table-cell table:style-name="ce3" office:value-type="string" calcext:value-type="string">
            <text:p>L0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3"/>
          <table:table-cell table:style-name="ce3" office:value-type="string" calcext:value-type="string">
            <text:p>mi</text:p>
          </table:table-cell>
          <table:table-cell table:style-name="ce3" office:value-type="float" office:value="30.03" calcext:value-type="float">
            <text:p>30.03</text:p>
          </table:table-cell>
          <table:table-cell table:style-name="ce40" office:value-type="float" office:value="20" calcext:value-type="float">
            <text:p>20.0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/>
          <table:table-cell/>
          <table:table-cell office:value-type="string" calcext:value-type="string">
            <text:p>Ls = lunghezza a piattino scarico</text:p>
          </table:table-cell>
          <table:table-cell table:style-name="ce3"/>
          <table:table-cell/>
          <table:table-cell office:value-type="string" calcext:value-type="string">
            <text:p>l1-l0</text:p>
          </table:table-cell>
          <table:table-cell table:number-columns-repeated="1004"/>
        </table:table-row>
        <table:table-row table:style-name="ro1">
          <table:table-cell table:style-name="ce3" office:value-type="float" office:value="4.96" calcext:value-type="float">
            <text:p>4.96</text:p>
          </table:table-cell>
          <table:table-cell table:number-columns-repeated="2"/>
          <table:table-cell table:style-name="ce3" office:value-type="string" calcext:value-type="string">
            <text:p>li1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  <table:table-cell table:style-name="ce18" office:value-type="string" calcext:value-type="string">
            <text:p>Ls</text:p>
          </table:table-cell>
          <table:table-cell table:style-name="ce3" table:formula="of:=[.E4]-[.E3]" office:value-type="float" office:value="12.5" calcext:value-type="float">
            <text:p>12.5</text:p>
          </table:table-cell>
          <table:table-cell table:number-columns-repeated="6"/>
          <table:table-cell office:value-type="string" calcext:value-type="string">
            <text:p>L2-6 = lunghezze a diverse masse</text:p>
          </table:table-cell>
          <table:table-cell table:number-columns-repeated="1007"/>
        </table:table-row>
        <table:table-row table:style-name="ro1">
          <table:table-cell table:style-name="ce3" office:value-type="float" office:value="10.03" calcext:value-type="float">
            <text:p>10.03</text:p>
          </table:table-cell>
          <table:table-cell table:number-columns-repeated="2"/>
          <table:table-cell table:style-name="ce3" office:value-type="string" calcext:value-type="string">
            <text:p>li2</text:p>
          </table:table-cell>
          <table:table-cell table:style-name="ce3" office:value-type="float" office:value="52.3" calcext:value-type="float">
            <text:p>52.3</text:p>
          </table:table-cell>
          <table:table-cell table:number-columns-repeated="3"/>
          <table:table-cell table:style-name="ce3" office:value-type="string" calcext:value-type="string">
            <text:p>Li-L0</text:p>
          </table:table-cell>
          <table:table-cell table:style-name="ce3" table:formula="of:=[.E5]-[.E3]" office:value-type="float" office:value="32.4" calcext:value-type="float">
            <text:p>32.4</text:p>
          </table:table-cell>
          <table:table-cell table:style-name="ce3" table:formula="of:=[.E6]-[.E3]" office:value-type="float" office:value="25.7" calcext:value-type="float">
            <text:p>25.7</text:p>
          </table:table-cell>
          <table:table-cell table:style-name="ce3" table:formula="of:=38.9-[.E3]" office:value-type="float" office:value="19" calcext:value-type="float">
            <text:p>19</text:p>
          </table:table-cell>
          <table:table-cell table:style-name="ce3" table:formula="of:=[.E8]-[.E3]" office:value-type="float" office:value="15.8" calcext:value-type="float">
            <text:p>15.8</text:p>
          </table:table-cell>
          <table:table-cell table:style-name="ce3" table:formula="of:=[.E9]-[.E3]" office:value-type="float" office:value="45.4" calcext:value-type="float">
            <text:p>45.4</text:p>
          </table:table-cell>
          <table:table-cell table:number-columns-repeated="1010"/>
        </table:table-row>
        <table:table-row table:style-name="ro1">
          <table:table-cell table:style-name="ce3" office:value-type="float" office:value="19.98" calcext:value-type="float">
            <text:p>19.98</text:p>
          </table:table-cell>
          <table:table-cell table:number-columns-repeated="2"/>
          <table:table-cell table:style-name="ce3" office:value-type="string" calcext:value-type="string">
            <text:p>li3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3"/>
          <table:table-cell table:style-name="ce3" office:value-type="string" calcext:value-type="string">
            <text:p>ki</text:p>
          </table:table-cell>
          <table:table-cell table:style-name="ce2" table:formula="of:=[.J3]*9.81/([.J5]-[.J4])" office:value-type="float" office:value="14.80373367" calcext:value-type="float">
            <text:p>14.80373367</text:p>
          </table:table-cell>
          <table:table-cell table:style-name="ce3" table:formula="of:=[.K3]*9.81/([.K5]-[.J4])" office:value-type="float" office:value="14.8636363636364" calcext:value-type="float">
            <text:p>14.8636363636364</text:p>
          </table:table-cell>
          <table:table-cell table:style-name="ce3" table:formula="of:=[.L3]*9.81/([.L5]-[.J4])" office:value-type="float" office:value="15.54507692" calcext:value-type="float">
            <text:p>15.54507692</text:p>
          </table:table-cell>
          <table:table-cell table:style-name="ce3" table:formula="of:=[.M3]*9.81/([.M5]-[.J4])" office:value-type="float" office:value="14.77445455" calcext:value-type="float">
            <text:p>14.77445455</text:p>
          </table:table-cell>
          <table:table-cell table:style-name="ce3" table:formula="of:=[.N3]*9.81/([.N5]-[.J4])" office:value-type="float" office:value="14.90583283" calcext:value-type="float">
            <text:p>14.90583283</text:p>
          </table:table-cell>
          <table:table-cell table:number-columns-repeated="1010"/>
        </table:table-row>
        <table:table-row table:style-name="ro1">
          <table:table-cell table:style-name="ce3" office:value-type="float" office:value="19.99" calcext:value-type="float">
            <text:p>19.99</text:p>
          </table:table-cell>
          <table:table-cell table:number-columns-repeated="2"/>
          <table:table-cell table:style-name="ce3" office:value-type="string" calcext:value-type="string">
            <text:p>li4</text:p>
          </table:table-cell>
          <table:table-cell table:style-name="ce3" office:value-type="float" office:value="38.9" calcext:value-type="float">
            <text:p>38.9</text:p>
          </table:table-cell>
          <table:table-cell table:number-columns-repeated="1019"/>
        </table:table-row>
        <table:table-row table:style-name="ro1">
          <table:table-cell table:style-name="ce3" office:value-type="float" office:value="20.01" calcext:value-type="float">
            <text:p>20.01</text:p>
          </table:table-cell>
          <table:table-cell table:number-columns-repeated="2"/>
          <table:table-cell table:style-name="ce3" office:value-type="string" calcext:value-type="string">
            <text:p>li5</text:p>
          </table:table-cell>
          <table:table-cell table:style-name="ce3" office:value-type="float" office:value="35.7" calcext:value-type="float">
            <text:p>35.7</text:p>
          </table:table-cell>
          <table:table-cell table:number-columns-repeated="2"/>
          <table:table-cell table:style-name="ce3" office:value-type="string" calcext:value-type="string">
            <text:p>***Ricordare che le unità di misura vanno portate a sistema internazionale</text:p>
          </table:table-cell>
          <table:table-cell table:number-columns-repeated="1016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3" office:value-type="string" calcext:value-type="string">
            <text:p>piattello (Mp)</text:p>
          </table:table-cell>
          <table:table-cell/>
          <table:table-cell table:style-name="ce3" office:value-type="string" calcext:value-type="string">
            <text:p>li6</text:p>
          </table:table-cell>
          <table:table-cell table:style-name="ce3" office:value-type="float" office:value="65.3" calcext:value-type="float">
            <text:p>65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isura armonica </text:p>
          </table:table-cell>
          <table:table-cell/>
          <table:table-cell table:style-name="ce3" office:value-type="string" calcext:value-type="string">
            <text:p><text:s/>massa (g)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office:value-type="float" office:value="10.3" calcext:value-type="float">
            <text:p>10.3</text:p>
          </table:table-cell>
          <table:table-cell table:style-name="ce14" office:value-type="float" office:value="20" calcext:value-type="float">
            <text:p>20.0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43" office:value-type="string" calcext:value-type="string" table:number-columns-spanned="2" table:number-rows-spanned="1">
            <text:p>20.1(piattello vuoto)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#1</text:p>
          </table:table-cell>
          <table:table-cell/>
          <table:table-cell table:style-name="ce5" office:value-type="string" calcext:value-type="string">
            <text:p>5T</text:p>
          </table:table-cell>
          <table:table-cell table:style-name="ce7" office:value-type="float" office:value="4.86" calcext:value-type="float">
            <text:p>4.86</text:p>
          </table:table-cell>
          <table:table-cell table:style-name="ce11" office:value-type="float" office:value="5.16" calcext:value-type="float">
            <text:p>5.16</text:p>
          </table:table-cell>
          <table:table-cell table:style-name="ce15" office:value-type="float" office:value="5.76" calcext:value-type="float">
            <text:p>5.76</text:p>
          </table:table-cell>
          <table:table-cell table:style-name="ce11" office:value-type="float" office:value="6.4" calcext:value-type="float">
            <text:p>6.40</text:p>
          </table:table-cell>
          <table:table-cell table:style-name="ce11" office:value-type="float" office:value="7.32" calcext:value-type="float">
            <text:p>7.32</text:p>
          </table:table-cell>
          <table:table-cell table:style-name="ce7" office:value-type="float" office:value="4.41" calcext:value-type="float">
            <text:p>4.41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4.4" calcext:value-type="float">
            <text:p>4.40</text:p>
          </table:table-cell>
          <table:table-cell table:style-name="ce19" office:value-type="float" office:value="4.46" calcext:value-type="float">
            <text:p>4.4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2</text:p>
          </table:table-cell>
          <table:table-cell/>
          <table:table-cell table:style-name="ce5"/>
          <table:table-cell table:style-name="ce8" office:value-type="float" office:value="5" calcext:value-type="float">
            <text:p>5.00</text:p>
          </table:table-cell>
          <table:table-cell table:style-name="ce12" office:value-type="float" office:value="5.18" calcext:value-type="float">
            <text:p>5.18</text:p>
          </table:table-cell>
          <table:table-cell table:style-name="ce5" office:value-type="float" office:value="5.78" calcext:value-type="float">
            <text:p>5.78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4" calcext:value-type="float">
            <text:p>7.24</text:p>
          </table:table-cell>
          <table:table-cell table:style-name="ce8" office:value-type="float" office:value="4.43" calcext:value-type="float">
            <text:p>4.43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8" calcext:value-type="float">
            <text:p>4.38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3</text:p>
          </table:table-cell>
          <table:table-cell/>
          <table:table-cell table:style-name="ce5"/>
          <table:table-cell table:style-name="ce8" office:value-type="float" office:value="4.96" calcext:value-type="float">
            <text:p>4.96</text:p>
          </table:table-cell>
          <table:table-cell table:style-name="ce12" office:value-type="float" office:value="5.35" calcext:value-type="float">
            <text:p>5.35</text:p>
          </table:table-cell>
          <table:table-cell table:style-name="ce5" office:value-type="float" office:value="6" calcext:value-type="float">
            <text:p>6.00</text:p>
          </table:table-cell>
          <table:table-cell table:style-name="ce12" office:value-type="float" office:value="6.37" calcext:value-type="float">
            <text:p>6.37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4" calcext:value-type="float">
            <text:p>4.44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4.41" calcext:value-type="float">
            <text:p>4.41</text:p>
          </table:table-cell>
          <table:table-cell table:style-name="ce20" office:value-type="float" office:value="4.47" calcext:value-type="float">
            <text:p>4.4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4</text:p>
          </table:table-cell>
          <table:table-cell/>
          <table:table-cell table:style-name="ce5"/>
          <table:table-cell table:style-name="ce8" office:value-type="float" office:value="4.84" calcext:value-type="float">
            <text:p>4.84</text:p>
          </table:table-cell>
          <table:table-cell table:style-name="ce12" office:value-type="float" office:value="5.26" calcext:value-type="float">
            <text:p>5.2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7.32" calcext:value-type="float">
            <text:p>7.32</text:p>
          </table:table-cell>
          <table:table-cell table:style-name="ce8" office:value-type="float" office:value="4.49" calcext:value-type="float">
            <text:p>4.49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5</text:p>
          </table:table-cell>
          <table:table-cell/>
          <table:table-cell table:style-name="ce5"/>
          <table:table-cell table:style-name="ce8" office:value-type="float" office:value="4.9" calcext:value-type="float">
            <text:p>4.90</text:p>
          </table:table-cell>
          <table:table-cell table:style-name="ce12" office:value-type="float" office:value="5.13" calcext:value-type="float">
            <text:p>5.13</text:p>
          </table:table-cell>
          <table:table-cell table:style-name="ce5" office:value-type="float" office:value="5.96" calcext:value-type="float">
            <text:p>5.96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7.26" calcext:value-type="float">
            <text:p>7.26</text:p>
          </table:table-cell>
          <table:table-cell table:style-name="ce8" office:value-type="float" office:value="4.41" calcext:value-type="float">
            <text:p>4.41</text:p>
          </table:table-cell>
          <table:table-cell table:number-columns-repeated="2" table:style-name="ce5" office:value-type="float" office:value="4.46" calcext:value-type="float">
            <text:p>4.46</text:p>
          </table:table-cell>
          <table:table-cell table:style-name="ce5" office:value-type="float" office:value="4.35" calcext:value-type="float">
            <text:p>4.35</text:p>
          </table:table-cell>
          <table:table-cell table:style-name="ce20" office:value-type="float" office:value="4.41" calcext:value-type="float">
            <text:p>4.41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6</text:p>
          </table:table-cell>
          <table:table-cell/>
          <table:table-cell table:style-name="ce5"/>
          <table:table-cell table:style-name="ce8" office:value-type="float" office:value="5.03" calcext:value-type="float">
            <text:p>5.03</text:p>
          </table:table-cell>
          <table:table-cell table:style-name="ce12" office:value-type="float" office:value="5.16" calcext:value-type="float">
            <text:p>5.16</text:p>
          </table:table-cell>
          <table:table-cell table:style-name="ce5" office:value-type="float" office:value="5.86" calcext:value-type="float">
            <text:p>5.86</text:p>
          </table:table-cell>
          <table:table-cell table:style-name="ce12" office:value-type="float" office:value="6.29" calcext:value-type="float">
            <text:p>6.29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6" calcext:value-type="float">
            <text:p>4.56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4.5" calcext:value-type="float">
            <text:p>4.50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4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7</text:p>
          </table:table-cell>
          <table:table-cell/>
          <table:table-cell table:style-name="ce5"/>
          <table:table-cell table:style-name="ce8" office:value-type="float" office:value="4.91" calcext:value-type="float">
            <text:p>4.91</text:p>
          </table:table-cell>
          <table:table-cell table:style-name="ce12" office:value-type="float" office:value="5.2" calcext:value-type="float">
            <text:p>5.20</text:p>
          </table:table-cell>
          <table:table-cell table:style-name="ce5" office:value-type="float" office:value="5.93" calcext:value-type="float">
            <text:p>5.93</text:p>
          </table:table-cell>
          <table:table-cell table:style-name="ce12" office:value-type="float" office:value="6.41" calcext:value-type="float">
            <text:p>6.41</text:p>
          </table:table-cell>
          <table:table-cell table:style-name="ce12" office:value-type="float" office:value="7.3" calcext:value-type="float">
            <text:p>7.30</text:p>
          </table:table-cell>
          <table:table-cell table:style-name="ce8" office:value-type="float" office:value="4.34" calcext:value-type="float">
            <text:p>4.34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2" table:style-name="ce5" office:value-type="float" office:value="4.43" calcext:value-type="float">
            <text:p>4.43</text:p>
          </table:table-cell>
          <table:table-cell table:style-name="ce20" office:value-type="float" office:value="4.35" calcext:value-type="float">
            <text:p>4.35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8</text:p>
          </table:table-cell>
          <table:table-cell/>
          <table:table-cell table:style-name="ce5"/>
          <table:table-cell table:style-name="ce8" office:value-type="float" office:value="5.06" calcext:value-type="float">
            <text:p>5.06</text:p>
          </table:table-cell>
          <table:table-cell table:style-name="ce12" office:value-type="float" office:value="5.12" calcext:value-type="float">
            <text:p>5.12</text:p>
          </table:table-cell>
          <table:table-cell table:style-name="ce5" office:value-type="float" office:value="5.8" calcext:value-type="float">
            <text:p>5.80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9" calcext:value-type="float">
            <text:p>7.29</text:p>
          </table:table-cell>
          <table:table-cell table:style-name="ce8" office:value-type="float" office:value="4.55" calcext:value-type="float">
            <text:p>4.55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4.43" calcext:value-type="float">
            <text:p>4.43</text:p>
          </table:table-cell>
          <table:table-cell table:style-name="ce20" office:value-type="float" office:value="4.36" calcext:value-type="float">
            <text:p>4.36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9</text:p>
          </table:table-cell>
          <table:table-cell/>
          <table:table-cell table:style-name="ce5"/>
          <table:table-cell table:style-name="ce8" office:value-type="float" office:value="4.94" calcext:value-type="float">
            <text:p>4.94</text:p>
          </table:table-cell>
          <table:table-cell table:style-name="ce12" office:value-type="float" office:value="5.06" calcext:value-type="float">
            <text:p>5.06</text:p>
          </table:table-cell>
          <table:table-cell table:style-name="ce5" office:value-type="float" office:value="5.72" calcext:value-type="float">
            <text:p>5.72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7.27" calcext:value-type="float">
            <text:p>7.27</text:p>
          </table:table-cell>
          <table:table-cell table:style-name="ce8" office:value-type="float" office:value="4.43" calcext:value-type="float">
            <text:p>4.43</text:p>
          </table:table-cell>
          <table:table-cell table:number-columns-repeated="2" table:style-name="ce5" office:value-type="float" office:value="4.41" calcext:value-type="float">
            <text:p>4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20" office:value-type="float" office:value="4.37" calcext:value-type="float">
            <text:p>4.37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#10</text:p>
          </table:table-cell>
          <table:table-cell/>
          <table:table-cell table:style-name="ce5"/>
          <table:table-cell table:style-name="ce9" office:value-type="float" office:value="4.83" calcext:value-type="float">
            <text:p>4.83</text:p>
          </table:table-cell>
          <table:table-cell table:style-name="ce13" office:value-type="float" office:value="5.15" calcext:value-type="float">
            <text:p>5.15</text:p>
          </table:table-cell>
          <table:table-cell table:style-name="ce16" office:value-type="float" office:value="5.87" calcext:value-type="float">
            <text:p>5.87</text:p>
          </table:table-cell>
          <table:table-cell table:style-name="ce13" office:value-type="float" office:value="6.41" calcext:value-type="float">
            <text:p>6.41</text:p>
          </table:table-cell>
          <table:table-cell table:style-name="ce13" office:value-type="float" office:value="7.36" calcext:value-type="float">
            <text:p>7.36</text:p>
          </table:table-cell>
          <table:table-cell table:style-name="ce9" office:value-type="float" office:value="4.46" calcext:value-type="float">
            <text:p>4.46</text:p>
          </table:table-cell>
          <table:table-cell table:style-name="ce16" office:value-type="float" office:value="4.43" calcext:value-type="float">
            <text:p>4.43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style-name="ce21" office:value-type="float" office:value="4.38" calcext:value-type="float">
            <text:p>4.38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Tau_medio</text:p>
          </table:table-cell>
          <table:table-cell table:style-name="ce5" table:formula="of:=SUM([.D14:.D23])/COUNTA([.D14:.D23])" office:value-type="float" office:value="4.933" calcext:value-type="float">
            <text:p>4.93</text:p>
          </table:table-cell>
          <table:table-cell table:style-name="ce5" table:formula="of:=SUM([.E14:.E23])/COUNTA([.E14:.E23])" office:value-type="float" office:value="5.177" calcext:value-type="float">
            <text:p>5.18</text:p>
          </table:table-cell>
          <table:table-cell table:style-name="ce5" table:formula="of:=SUM([.F14:.F23])/COUNTA([.F14:.F23])" office:value-type="float" office:value="5.854" calcext:value-type="float">
            <text:p>5.85</text:p>
          </table:table-cell>
          <table:table-cell table:style-name="ce5" table:formula="of:=SUM([.G14:.G23])/COUNTA([.G14:.G23])" office:value-type="float" office:value="6.336" calcext:value-type="float">
            <text:p>6.34</text:p>
          </table:table-cell>
          <table:table-cell table:style-name="ce5" table:formula="of:=SUM([.H14:.H23])/COUNTA([.H14:.H23])" office:value-type="float" office:value="7.297" calcext:value-type="float">
            <text:p>7.30</text:p>
          </table:table-cell>
          <table:table-cell table:style-name="ce5" table:formula="of:=SUM([.I14:.I23])/COUNTA([.I14:.I23])" office:value-type="float" office:value="4.452" calcext:value-type="float">
            <text:p>4.45</text:p>
          </table:table-cell>
          <table:table-cell table:style-name="ce5" table:formula="of:=SUM([.J14:.J23])/COUNTA([.J14:.J23])" office:value-type="float" office:value="4.425" calcext:value-type="float">
            <text:p>4.43</text:p>
          </table:table-cell>
          <table:table-cell table:style-name="ce5" table:formula="of:=SUM([.K14:.K23])/COUNTA([.K14:.K23])" office:value-type="float" office:value="4.437" calcext:value-type="float">
            <text:p>4.44</text:p>
          </table:table-cell>
          <table:table-cell table:style-name="ce5" table:formula="of:=SUM([.L14:.L23])/COUNTA([.L14:.L23])" office:value-type="float" office:value="4.418" calcext:value-type="float">
            <text:p>4.42</text:p>
          </table:table-cell>
          <table:table-cell table:style-name="ce5" table:formula="of:=SUM([.M14:.M23])/COUNTA([.M14:.M23])" office:value-type="float" office:value="4.398" calcext:value-type="float">
            <text:p>4.40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quadro</text:p>
          </table:table-cell>
          <table:table-cell/>
          <table:table-cell table:style-name="ce5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sigma_t </text:p>
          </table:table-cell>
          <table:table-cell table:style-name="ce3" table:formula="of:=SQRT([.D25])" office:value-type="float" office:value="0" calcext:value-type="float">
            <text:p>0</text:p>
          </table:table-cell>
          <table:table-cell table:style-name="ce3" table:formula="of:=SQRT([.E25])" office:value-type="float" office:value="0" calcext:value-type="float">
            <text:p>0</text:p>
          </table:table-cell>
          <table:table-cell table:style-name="ce3" table:formula="of:=SQRT([.F25])" office:value-type="float" office:value="0" calcext:value-type="float">
            <text:p>0</text:p>
          </table:table-cell>
          <table:table-cell table:style-name="ce3" table:formula="of:=SQRT([.G25])" office:value-type="float" office:value="0" calcext:value-type="float">
            <text:p>0</text:p>
          </table:table-cell>
          <table:table-cell table:style-name="ce3" table:formula="of:=SQRT([.H25])" office:value-type="float" office:value="0" calcext:value-type="float">
            <text:p>0</text:p>
          </table:table-cell>
          <table:table-cell table:style-name="ce3" table:formula="of:=SQRT([.I25])" office:value-type="float" office:value="0" calcext:value-type="float">
            <text:p>0</text:p>
          </table:table-cell>
          <table:table-cell table:style-name="ce3" table:formula="of:=SQRT([.J25])" office:value-type="float" office:value="0" calcext:value-type="float">
            <text:p>0</text:p>
          </table:table-cell>
          <table:table-cell table:style-name="ce3" table:formula="of:=SQRT([.K25])" office:value-type="float" office:value="0" calcext:value-type="float">
            <text:p>0</text:p>
          </table:table-cell>
          <table:table-cell table:style-name="ce3" table:formula="of:=SQRT([.L25])" office:value-type="float" office:value="0" calcext:value-type="float">
            <text:p>0</text:p>
          </table:table-cell>
          <table:table-cell table:style-name="ce3" table:formula="of:=SQRT([.M2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formula="of:=[.D12]+[.$A$9]" office:value-type="float" office:value="25.07" calcext:value-type="float">
            <text:p>25.07</text:p>
          </table:table-cell>
          <table:table-cell table:style-name="ce3" table:formula="of:=[.E12]+[.$A$9]" office:value-type="float" office:value="30.4" calcext:value-type="float">
            <text:p>30.4</text:p>
          </table:table-cell>
          <table:table-cell table:style-name="ce17" table:formula="of:=[.F12]+[.$A$9]" office:value-type="float" office:value="40.1" calcext:value-type="float">
            <text:p>40.1</text:p>
          </table:table-cell>
          <table:table-cell table:style-name="ce3" table:formula="of:=[.G12]+[.$A$9]" office:value-type="float" office:value="50.13" calcext:value-type="float">
            <text:p>50.13</text:p>
          </table:table-cell>
          <table:table-cell table:style-name="ce3" table:formula="of:=[.H12]+[.$A$9]" office:value-type="float" office:value="70.09" calcext:value-type="float">
            <text:p>70.09</text:p>
          </table:table-cell>
          <table:table-cell table:style-name="ce6" office:value-type="string" calcext:value-type="string">
            <text:p>20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mpiezze oscillazioni smorzate ( ogni 15 secondi)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docs.google.com/document/d/1uuDKU9tcjfnfKrMN9zlJfUpfZcBqw6zj_iY2pjAN5dU/edit?usp=sharing" xlink:type="simple">Esperienza Lab. Molle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CALCOLI PER LA RELAZION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TODO STATICO</text:p>
          </table:table-cell>
          <table:table-cell table:number-columns-repeated="17"/>
          <table:table-cell table:style-name="ce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RORI</text:p>
          </table:table-cell>
          <table:table-cell/>
          <table:table-cell office:value-type="string" calcext:value-type="string">
            <text:p>errore m = 0.01g</text:p>
          </table:table-cell>
          <table:table-cell/>
          <table:table-cell office:value-type="string" calcext:value-type="string">
            <text:p>ls</text:p>
          </table:table-cell>
          <table:table-cell office:value-type="float" office:value="32.4" calcext:value-type="float">
            <text:p>32.4</text:p>
          </table:table-cell>
          <table:table-cell table:number-columns-repeated="12"/>
          <table:table-cell table:style-name="ce5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errore l = 0.05 cm</text:p>
          </table:table-cell>
          <table:table-cell table:number-columns-repeated="1020"/>
        </table:table-row>
        <table:table-row table:style-name="ro1">
          <table:table-cell table:number-columns-repeated="21"/>
          <table:table-cell table:style-name="ce5"/>
          <table:table-cell table:number-columns-repeated="1002"/>
        </table:table-row>
        <table:table-row table:style-name="ro1">
          <table:table-cell office:value-type="string" calcext:value-type="string">
            <text:p>errore cgs</text:p>
          </table:table-cell>
          <table:table-cell office:value-type="string" calcext:value-type="string">
            <text:p>k_i [g/s^2]</text:p>
          </table:table-cell>
          <table:table-cell office:value-type="string" calcext:value-type="string">
            <text:p>m_i [kg]</text:p>
          </table:table-cell>
          <table:table-cell office:value-type="string" calcext:value-type="string">
            <text:p>m_i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k_i</text:p>
          </table:table-cell>
          <table:table-cell office:value-type="string" calcext:value-type="string">
            <text:p>UNITÀ SI[n/m]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errore g/s2</text:p>
          </table:table-cell>
          <table:table-cell table:number-columns-repeated="12"/>
          <table:table-cell table:style-name="ce5"/>
          <table:table-cell table:number-columns-repeated="1002"/>
        </table:table-row>
        <table:table-row table:style-name="ro1">
          <table:table-cell table:formula="of:=[.I48]*100" office:value-type="float" office:value="47.7438016528925" calcext:value-type="float">
            <text:p>47.7438016528925</text:p>
          </table:table-cell>
          <table:table-cell table:formula="of:=[.F48]*100" office:value-type="float" office:value="1477.44545454545" calcext:value-type="float">
            <text:p>1477.44545454545</text:p>
          </table:table-cell>
          <table:table-cell table:formula="of:=[.D48]/1000" office:value-type="float" office:value="0.00497" calcext:value-type="float">
            <text:p>0.00497</text:p>
          </table:table-cell>
          <table:table-cell office:value-type="float" office:value="4.97" calcext:value-type="float">
            <text:p>4.97</text:p>
          </table:table-cell>
          <table:table-cell office:value-type="float" office:value="35.7" calcext:value-type="float">
            <text:p>35.7</text:p>
          </table:table-cell>
          <table:table-cell table:formula="of:=([.D48]*9.81)/([.E48]-[.$G44])" office:value-type="float" office:value="14.7744545454545" calcext:value-type="float">
            <text:p>14.7744545454545</text:p>
          </table:table-cell>
          <table:table-cell table:formula="of:=[.F48]*0.1" office:value-type="float" office:value="1.47744545454545" calcext:value-type="float">
            <text:p>1.47744545454545</text:p>
          </table:table-cell>
          <table:table-cell table:formula="of:=[.G48]*(0.01/[.D48]+(2*0.05/([.E48]-[.$G$44])))" office:value-type="float" office:value="0.0477438016528925" calcext:value-type="float">
            <text:p>0.0477438016528925</text:p>
          </table:table-cell>
          <table:table-cell table:formula="of:=[.H48]*10" office:value-type="float" office:value="0.477438016528925" calcext:value-type="float">
            <text:p>0.477438016528925</text:p>
          </table:table-cell>
          <table:table-cell table:number-columns-repeated="1015"/>
        </table:table-row>
        <table:table-row table:style-name="ro1">
          <table:table-cell table:formula="of:=[.I49]*100" office:value-type="float" office:value="25.4247337278107" calcext:value-type="float">
            <text:p>25.4247337278107</text:p>
          </table:table-cell>
          <table:table-cell table:formula="of:=[.F49]*100" office:value-type="float" office:value="1554.50769230769" calcext:value-type="float">
            <text:p>1554.50769230769</text:p>
          </table:table-cell>
          <table:table-cell table:formula="of:=[.D49]/1000" office:value-type="float" office:value="0.0103" calcext:value-type="float">
            <text:p>0.0103</text:p>
          </table:table-cell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table:formula="of:=([.D49]*9.81)/([.E49]-[.$G$44])" office:value-type="float" office:value="15.5450769230769" calcext:value-type="float">
            <text:p>15.5450769230769</text:p>
          </table:table-cell>
          <table:table-cell table:formula="of:=[.F49]*0.1" office:value-type="float" office:value="1.55450769230769" calcext:value-type="float">
            <text:p>1.55450769230769</text:p>
          </table:table-cell>
          <table:table-cell table:formula="of:=[.G49]*(0.01/[.D49]+(2*0.05/([.E49]-[.$G$44])))" office:value-type="float" office:value="0.0254247337278107" calcext:value-type="float">
            <text:p>0.0254247337278107</text:p>
          </table:table-cell>
          <table:table-cell table:formula="of:=[.H49]*10" office:value-type="float" office:value="0.254247337278107" calcext:value-type="float">
            <text:p>0.254247337278107</text:p>
          </table:table-cell>
          <table:table-cell table:number-columns-repeated="1015"/>
        </table:table-row>
        <table:table-row table:style-name="ro1">
          <table:table-cell table:formula="of:=[.I50]*100" office:value-type="float" office:value="12.0035123966942" calcext:value-type="float">
            <text:p>12.0035123966942</text:p>
          </table:table-cell>
          <table:table-cell table:formula="of:=[.F50]*100" office:value-type="float" office:value="1486.36363636364" calcext:value-type="float">
            <text:p>1486.36363636364</text:p>
          </table:table-cell>
          <table:table-cell table:formula="of:=[.D50]/1000"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table:formula="of:=([.D50]*9.81)/([.E50]-[.$G$44])" office:value-type="float" office:value="14.8636363636364" calcext:value-type="float">
            <text:p>14.8636363636364</text:p>
          </table:table-cell>
          <table:table-cell table:formula="of:=[.F50]*0.1" office:value-type="float" office:value="1.48636363636364" calcext:value-type="float">
            <text:p>1.48636363636364</text:p>
          </table:table-cell>
          <table:table-cell table:formula="of:=[.G50]*(0.01/[.D50]+(2*0.05/([.E50]-[.$G$44])))" office:value-type="float" office:value="0.0120035123966942" calcext:value-type="float">
            <text:p>0.0120035123966942</text:p>
          </table:table-cell>
          <table:table-cell table:formula="of:=[.H50]*10" office:value-type="float" office:value="0.120035123966942" calcext:value-type="float">
            <text:p>0.120035123966942</text:p>
          </table:table-cell>
          <table:table-cell table:number-columns-repeated="1015"/>
        </table:table-row>
        <table:table-row table:style-name="ro1">
          <table:table-cell table:formula="of:=[.I51]*100" office:value-type="float" office:value="7.93202696901594" calcext:value-type="float">
            <text:p>7.93202696901594</text:p>
          </table:table-cell>
          <table:table-cell table:formula="of:=[.F51]*100" office:value-type="float" office:value="1480.37336683417" calcext:value-type="float">
            <text:p>1480.37336683417</text:p>
          </table:table-cell>
          <table:table-cell table:formula="of:=[.D51]/1000" office:value-type="float" office:value="0.03003" calcext:value-type="float">
            <text:p>0.03003</text:p>
          </table:table-cell>
          <table:table-cell office:value-type="float" office:value="30.03" calcext:value-type="float">
            <text:p>30.03</text:p>
          </table:table-cell>
          <table:table-cell office:value-type="float" office:value="52.3" calcext:value-type="float">
            <text:p>52.3</text:p>
          </table:table-cell>
          <table:table-cell table:formula="of:=([.D51]*9.81)/([.E51]-[.$G$44])" office:value-type="float" office:value="14.8037336683417" calcext:value-type="float">
            <text:p>14.8037336683417</text:p>
          </table:table-cell>
          <table:table-cell table:formula="of:=[.F51]*0.1" office:value-type="float" office:value="1.48037336683417" calcext:value-type="float">
            <text:p>1.48037336683417</text:p>
          </table:table-cell>
          <table:table-cell table:formula="of:=[.G51]*(0.01/[.D51]+(2*0.05/([.E51]-[.$G$44])))" office:value-type="float" office:value="0.00793202696901594" calcext:value-type="float">
            <text:p>0.00793202696901594</text:p>
          </table:table-cell>
          <table:table-cell table:formula="of:=[.H51]*10" office:value-type="float" office:value="0.0793202696901594" calcext:value-type="float">
            <text:p>0.0793202696901594</text:p>
          </table:table-cell>
          <table:table-cell table:number-columns-repeated="1015"/>
        </table:table-row>
        <table:table-row table:style-name="ro1">
          <table:table-cell table:formula="of:=[.I52]*100" office:value-type="float" office:value="4.82882456740053" calcext:value-type="float">
            <text:p>4.82882456740053</text:p>
          </table:table-cell>
          <table:table-cell table:formula="of:=[.F52]*100" office:value-type="float" office:value="1490.58328267477" calcext:value-type="float">
            <text:p>1490.58328267477</text:p>
          </table:table-cell>
          <table:table-cell table:formula="of:=[.D52]/1000" office:value-type="float" office:value="0.04999" calcext:value-type="float">
            <text:p>0.04999</text:p>
          </table:table-cell>
          <table:table-cell office:value-type="float" office:value="49.99" calcext:value-type="float">
            <text:p>49.99</text:p>
          </table:table-cell>
          <table:table-cell office:value-type="float" office:value="65.3" calcext:value-type="float">
            <text:p>65.3</text:p>
          </table:table-cell>
          <table:table-cell table:formula="of:=([.D52]*9.81)/([.E52]-[.$G$44])" office:value-type="float" office:value="14.9058328267477" calcext:value-type="float">
            <text:p>14.9058328267477</text:p>
          </table:table-cell>
          <table:table-cell table:formula="of:=[.F52]*0.1" office:value-type="float" office:value="1.49058328267477" calcext:value-type="float">
            <text:p>1.49058328267477</text:p>
          </table:table-cell>
          <table:table-cell table:formula="of:=[.G52]*(0.01/[.D52]+(2*0.05/([.E52]-[.$G$44])))" office:value-type="float" office:value="0.00482882456740053" calcext:value-type="float">
            <text:p>0.00482882456740053</text:p>
          </table:table-cell>
          <table:table-cell table:formula="of:=[.H52]*10" office:value-type="float" office:value="0.0482882456740053" calcext:value-type="float">
            <text:p>0.04828824567400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5"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.487" calcext:value-type="float">
            <text:p>1.487</text:p>
          </table:table-cell>
          <table:table-cell office:value-type="float" office:value="1487" calcext:value-type="float">
            <text:p>1487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.487" calcext:value-type="float">
            <text:p>1.487</text:p>
          </table:table-cell>
          <table:table-cell office:value-type="float" office:value="1487" calcext:value-type="float">
            <text:p>148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8" table:number-rows-spanned="2">
            <text:p>GRAFICI MISURAZIONE DINAMICA 5T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style-name="ce27"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formula="of:=COM.MICROSOFT.CONCAT(ROUND([.K67];2);&quot;-&quot;;ROUND([.L67];2))" office:value-type="string" office:string-value="4.83-4.89" calcext:value-type="string">
            <text:p>4.83-4.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68:.E77])" office:value-type="float" office:value="4.83" calcext:value-type="float">
            <text:p>4.83</text:p>
          </table:table-cell>
          <table:table-cell table:style-name="ce53" table:formula="of:=[.K67]+[.$I$68]" office:value-type="float" office:value="4.8875" calcext:value-type="float">
            <text:p>4.89</text:p>
          </table:table-cell>
          <table:table-cell table:number-columns-repeated="10"/>
          <table:table-cell table:formula="of:=COM.MICROSOFT.CONCAT(ROUND([.K68];2);&quot;-&quot;;ROUND([.L68];2))" office:value-type="string" office:string-value="4.89-4.95" calcext:value-type="string">
            <text:p>4.89-4.9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4.86" calcext:value-type="float">
            <text:p>4.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68]))" office:value-type="float" office:value="4" calcext:value-type="float">
            <text:p>4</text:p>
          </table:table-cell>
          <table:table-cell table:formula="of:=(MAX([.E68:.E77])-MIN([.E68:.E77]))/[.H68]" office:value-type="float" office:value="0.0574999999999999" calcext:value-type="float">
            <text:p>0.0574999999999999</text:p>
          </table:table-cell>
          <table:table-cell/>
          <table:table-cell table:style-name="ce53" table:formula="of:=[.L67]" office:value-type="float" office:value="4.8875" calcext:value-type="float">
            <text:p>4.89</text:p>
          </table:table-cell>
          <table:table-cell table:style-name="ce53" table:formula="of:=[.K68]+[.$I$68]" office:value-type="float" office:value="4.945" calcext:value-type="float">
            <text:p>4.95</text:p>
          </table:table-cell>
          <table:table-cell table:number-columns-repeated="10"/>
          <table:table-cell table:formula="of:=COM.MICROSOFT.CONCAT(ROUND([.K69];2);&quot;-&quot;;ROUND([.L69];2))" office:value-type="string" office:string-value="4.95-5" calcext:value-type="string">
            <text:p>4.95-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5"/>
          <table:table-cell table:style-name="ce53" table:formula="of:=[.L68]" office:value-type="float" office:value="4.945" calcext:value-type="float">
            <text:p>4.95</text:p>
          </table:table-cell>
          <table:table-cell table:style-name="ce53" table:formula="of:=[.K69]+[.$I$68]" office:value-type="float" office:value="5.0025" calcext:value-type="float">
            <text:p>5.00</text:p>
          </table:table-cell>
          <table:table-cell table:number-columns-repeated="10"/>
          <table:table-cell table:formula="of:=COM.MICROSOFT.CONCAT(ROUND([.K70];2);&quot;-&quot;;ROUND([.L70];2))" office:value-type="string" office:string-value="5-5.06" calcext:value-type="string">
            <text:p>5-5.0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4" calcext:value-type="float">
            <text:p>4.44</text:p>
          </table:table-cell>
          <table:table-cell table:style-name="ce8" office:value-type="float" office:value="4.96" calcext:value-type="float">
            <text:p>4.96</text:p>
          </table:table-cell>
          <table:table-cell table:number-columns-repeated="5"/>
          <table:table-cell table:style-name="ce53" table:formula="of:=[.L69]" office:value-type="float" office:value="5.0025" calcext:value-type="float">
            <text:p>5.00</text:p>
          </table:table-cell>
          <table:table-cell table:style-name="ce53" table:formula="of:=[.K70]+[.$I$68]" office:value-type="float" office:value="5.06" calcext:value-type="float">
            <text:p>5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4.84" calcext:value-type="float">
            <text:p>4.8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4.9" calcext:value-type="float">
            <text:p>4.90</text:p>
          </table:table-cell>
          <table:table-cell table:number-columns-repeated="5"/>
          <table:table-cell table:style-name="ce53" table:number-matrix-columns-spanned="1" table:number-matrix-rows-spanned="5" table:formula="of:=FREQUENCY([.E68:.E77];[.L67:.L70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6" calcext:value-type="float">
            <text:p>4.56</text:p>
          </table:table-cell>
          <table:table-cell table:style-name="ce8" office:value-type="float" office:value="5.03" calcext:value-type="float">
            <text:p>5.03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4" calcext:value-type="float">
            <text:p>4.34</text:p>
          </table:table-cell>
          <table:table-cell table:style-name="ce8" office:value-type="float" office:value="4.91" calcext:value-type="float">
            <text:p>4.91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.94" calcext:value-type="float">
            <text:p>4.94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4.83" calcext:value-type="float">
            <text:p>4.83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68:.D77])/10" office:value-type="float" office:value="4.452" calcext:value-type="float">
            <text:p>4.452</text:p>
          </table:table-cell>
          <table:table-cell table:formula="of:=SUM([.E68:.E77])/10" office:value-type="float" office:value="4.933" calcext:value-type="float">
            <text:p>4.933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78]/5" office:value-type="float" office:value="0.8904" calcext:value-type="float">
            <text:p>0.8904</text:p>
          </table:table-cell>
          <table:table-cell table:formula="of:=[.E78]/5" office:value-type="float" office:value="0.9866" calcext:value-type="float">
            <text:p>0.986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/>
          <table:table-cell>
            <draw:frame draw:z-index="4" draw:style-name="gr1" draw:text-style-name="P1" svg:width="6.2988in" svg:height="3.5429in" svg:x="0.0976in" svg:y="0.0445in">
              <draw:object draw:notify-on-update-of-ranges="Sheet1.W85:Sheet1.W88 Sheet1.K91:Sheet1.K9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4"/>
          <table:table-cell table:number-columns-repeated="2"/>
          <table:table-cell table:style-name="ce53" table:number-columns-repeated="2"/>
          <table:table-cell table:number-columns-repeated="10"/>
          <table:table-cell table:formula="of:=COM.MICROSOFT.CONCAT(ROUND([.K86];2);&quot;-&quot;;ROUND([.L86];2))" office:value-type="string" office:string-value="5.06-5.13" calcext:value-type="string">
            <text:p>5.06-5.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87:.E96])" office:value-type="float" office:value="5.06" calcext:value-type="float">
            <text:p>5.06</text:p>
          </table:table-cell>
          <table:table-cell table:style-name="ce53" table:formula="of:=[.K86]+[.$I$87]" office:value-type="float" office:value="5.1325" calcext:value-type="float">
            <text:p>5.13</text:p>
          </table:table-cell>
          <table:table-cell table:number-columns-repeated="10"/>
          <table:table-cell table:formula="of:=COM.MICROSOFT.CONCAT(ROUND([.K87];2);&quot;-&quot;;ROUND([.L87];2))" office:value-type="string" office:string-value="5.13-5.21" calcext:value-type="string">
            <text:p>5.13-5.2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34" office:value-type="float" office:value="4.42" calcext:value-type="float">
            <text:p>4.42</text:p>
          </table:table-cell>
          <table:table-cell table:style-name="ce7" office:value-type="float" office:value="5.16" calcext:value-type="float">
            <text:p>5.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87]))" office:value-type="float" office:value="4" calcext:value-type="float">
            <text:p>4</text:p>
          </table:table-cell>
          <table:table-cell table:formula="of:=(MAX([.E87:.E96])-MIN([.E87:.E96]))/[.H87]" office:value-type="float" office:value="0.0725" calcext:value-type="float">
            <text:p>0.0725</text:p>
          </table:table-cell>
          <table:table-cell/>
          <table:table-cell table:style-name="ce53" table:formula="of:=[.L86]" office:value-type="float" office:value="5.1325" calcext:value-type="float">
            <text:p>5.13</text:p>
          </table:table-cell>
          <table:table-cell table:style-name="ce53" table:formula="of:=[.K87]+[.$I$87]" office:value-type="float" office:value="5.205" calcext:value-type="float">
            <text:p>5.21</text:p>
          </table:table-cell>
          <table:table-cell table:number-columns-repeated="10"/>
          <table:table-cell table:formula="of:=COM.MICROSOFT.CONCAT(ROUND([.K88];2);&quot;-&quot;;ROUND([.L88];2))" office:value-type="string" office:string-value="5.21-5.28" calcext:value-type="string">
            <text:p>5.21-5.2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5.18" calcext:value-type="float">
            <text:p>5.18</text:p>
          </table:table-cell>
          <table:table-cell table:number-columns-repeated="5"/>
          <table:table-cell table:style-name="ce53" table:formula="of:=[.L87]" office:value-type="float" office:value="5.205" calcext:value-type="float">
            <text:p>5.21</text:p>
          </table:table-cell>
          <table:table-cell table:style-name="ce53" table:formula="of:=[.K88]+[.$I$87]" office:value-type="float" office:value="5.2775" calcext:value-type="float">
            <text:p>5.28</text:p>
          </table:table-cell>
          <table:table-cell table:number-columns-repeated="10"/>
          <table:table-cell table:formula="of:=COM.MICROSOFT.CONCAT(ROUND([.K89];2);&quot;-&quot;;ROUND([.L89];2))" office:value-type="string" office:string-value="5.28-5.36" calcext:value-type="string">
            <text:p>5.28-5.3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35" calcext:value-type="float">
            <text:p>5.35</text:p>
          </table:table-cell>
          <table:table-cell table:number-columns-repeated="5"/>
          <table:table-cell table:style-name="ce53" table:formula="of:=[.L88]" office:value-type="float" office:value="5.2775" calcext:value-type="float">
            <text:p>5.28</text:p>
          </table:table-cell>
          <table:table-cell table:style-name="ce53" table:formula="of:=[.K89]+[.$I$87]+0.01" office:value-type="float" office:value="5.36" calcext:value-type="float">
            <text:p>5.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26" calcext:value-type="float">
            <text:p>5.2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13" calcext:value-type="float">
            <text:p>5.13</text:p>
          </table:table-cell>
          <table:table-cell table:number-columns-repeated="5"/>
          <table:table-cell table:style-name="ce53" table:number-matrix-columns-spanned="1" table:number-matrix-rows-spanned="5" table:formula="of:=FREQUENCY([.E87:.E96];[.L86:.L89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5.16" calcext:value-type="float">
            <text:p>5.16</text:p>
          </table:table-cell>
          <table:table-cell table:number-columns-repeated="5"/>
          <table:table-cell table:style-name="ce53" office:value-type="float" office:value="5" calcext:value-type="float">
            <text:p>5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2" calcext:value-type="float">
            <text:p>5.20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9" calcext:value-type="float">
            <text:p>4.49</text:p>
          </table:table-cell>
          <table:table-cell table:style-name="ce8" office:value-type="float" office:value="5.12" calcext:value-type="float">
            <text:p>5.12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06" calcext:value-type="float">
            <text:p>5.06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3" calcext:value-type="float">
            <text:p>4.43</text:p>
          </table:table-cell>
          <table:table-cell table:style-name="ce9" office:value-type="float" office:value="5.15" calcext:value-type="float">
            <text:p>5.15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87:.D96])/10" office:value-type="float" office:value="4.425" calcext:value-type="float">
            <text:p>4.425</text:p>
          </table:table-cell>
          <table:table-cell table:formula="of:=SUM([.E87:.E96])/10" office:value-type="float" office:value="5.177" calcext:value-type="float">
            <text:p>5.177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97]/5" office:value-type="float" office:value="0.885" calcext:value-type="float">
            <text:p>0.885</text:p>
          </table:table-cell>
          <table:table-cell table:formula="of:=[.E97]/5" office:value-type="float" office:value="1.0354" calcext:value-type="float">
            <text:p>1.035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/>
          <table:table-cell>
            <draw:frame draw:z-index="5" draw:style-name="gr1" draw:text-style-name="P1" svg:width="6.2988in" svg:height="3.5429in" svg:x="0.0508in" svg:y="0.0299in">
              <draw:object draw:notify-on-update-of-ranges="Sheet1.W104:Sheet1.W107 Sheet1.K110:Sheet1.K1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"/>
          <table:table-cell table:formula="of:=COM.MICROSOFT.CONCAT(ROUND([.K105];2);&quot;-&quot;;ROUND([.L105];2))" office:value-type="string" office:string-value="5.72-5.79" calcext:value-type="string">
            <text:p>5.72-5.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06:.E115])" office:value-type="float" office:value="5.72" calcext:value-type="float">
            <text:p>5.72</text:p>
          </table:table-cell>
          <table:table-cell table:style-name="ce53" table:formula="of:=[.K105]+[.$I$106]" office:value-type="float" office:value="5.79" calcext:value-type="float">
            <text:p>5.79</text:p>
          </table:table-cell>
          <table:table-cell table:number-columns-repeated="10"/>
          <table:table-cell table:formula="of:=COM.MICROSOFT.CONCAT(ROUND([.K106];2);&quot;-&quot;;ROUND([.L106];2))" office:value-type="string" office:string-value="5.79-5.86" calcext:value-type="string">
            <text:p>5.79-5.8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.76" calcext:value-type="float">
            <text:p>5.7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06]))" office:value-type="float" office:value="4" calcext:value-type="float">
            <text:p>4</text:p>
          </table:table-cell>
          <table:table-cell table:formula="of:=(MAX([.E106:.E115])-MIN([.E106:.E115]))/[.H106]" office:value-type="float" office:value="0.0700000000000001" calcext:value-type="float">
            <text:p>0.0700000000000001</text:p>
          </table:table-cell>
          <table:table-cell/>
          <table:table-cell table:style-name="ce53" table:formula="of:=[.L105]" office:value-type="float" office:value="5.79" calcext:value-type="float">
            <text:p>5.79</text:p>
          </table:table-cell>
          <table:table-cell table:style-name="ce53" table:formula="of:=[.K106]+[.$I$106]" office:value-type="float" office:value="5.86" calcext:value-type="float">
            <text:p>5.86</text:p>
          </table:table-cell>
          <table:table-cell table:number-columns-repeated="10"/>
          <table:table-cell table:formula="of:=COM.MICROSOFT.CONCAT(ROUND([.K107];2);&quot;-&quot;;ROUND([.L107];2))" office:value-type="string" office:string-value="5.86-5.93" calcext:value-type="string">
            <text:p>5.86-5.9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78" calcext:value-type="float">
            <text:p>5.78</text:p>
          </table:table-cell>
          <table:table-cell table:number-columns-repeated="5"/>
          <table:table-cell table:style-name="ce53" table:formula="of:=[.L106]" office:value-type="float" office:value="5.86" calcext:value-type="float">
            <text:p>5.86</text:p>
          </table:table-cell>
          <table:table-cell table:style-name="ce53" table:formula="of:=[.K107]+[.$I$106]" office:value-type="float" office:value="5.93" calcext:value-type="float">
            <text:p>5.93</text:p>
          </table:table-cell>
          <table:table-cell table:number-columns-repeated="10"/>
          <table:table-cell table:formula="of:=COM.MICROSOFT.CONCAT(ROUND([.K108];2);&quot;-&quot;;ROUND([.L108];2))" office:value-type="string" office:string-value="5.93-6" calcext:value-type="string">
            <text:p>5.93-6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5" calcext:value-type="float">
            <text:p>4.45</text:p>
          </table:table-cell>
          <table:table-cell table:style-name="ce8" office:value-type="float" office:value="6" calcext:value-type="float">
            <text:p>6.00</text:p>
          </table:table-cell>
          <table:table-cell table:number-columns-repeated="5"/>
          <table:table-cell table:style-name="ce53" table:formula="of:=[.L107]" office:value-type="float" office:value="5.93" calcext:value-type="float">
            <text:p>5.93</text:p>
          </table:table-cell>
          <table:table-cell table:style-name="ce53" table:formula="of:=[.K108]+[.$I$106]" office:value-type="float" office:value="6" calcext:value-type="float">
            <text:p>6.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5.96" calcext:value-type="float">
            <text:p>5.96</text:p>
          </table:table-cell>
          <table:table-cell table:number-columns-repeated="5"/>
          <table:table-cell table:style-name="ce53" table:number-matrix-columns-spanned="1" table:number-matrix-rows-spanned="5" table:formula="of:=FREQUENCY([.E106:.E115];[.L105:.L108])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5" calcext:value-type="float">
            <text:p>4.50</text:p>
          </table:table-cell>
          <table:table-cell table:style-name="ce8" office:value-type="float" office:value="5.86" calcext:value-type="float">
            <text:p>5.86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5.93" calcext:value-type="float">
            <text:p>5.93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8" calcext:value-type="float">
            <text:p>5.80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5.72" calcext:value-type="float">
            <text:p>5.72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5.87" calcext:value-type="float">
            <text:p>5.87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06:.D115])/10" office:value-type="float" office:value="4.437" calcext:value-type="float">
            <text:p>4.437</text:p>
          </table:table-cell>
          <table:table-cell table:formula="of:=SUM([.E106:.E115])/10" office:value-type="float" office:value="5.854" calcext:value-type="float">
            <text:p>5.854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16]/5" office:value-type="float" office:value="0.8874" calcext:value-type="float">
            <text:p>0.8874</text:p>
          </table:table-cell>
          <table:table-cell table:formula="of:=[.E116]/5" office:value-type="float" office:value="1.1708" calcext:value-type="float">
            <text:p>1.1708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4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3" table:number-columns-repeated="2"/>
          <table:table-cell/>
          <table:table-cell>
            <draw:frame draw:z-index="6" draw:style-name="gr1" draw:text-style-name="P1" svg:width="6.2988in" svg:height="3.5429in" svg:x="0.061in" svg:y="0.148in">
              <draw:object draw:notify-on-update-of-ranges="Sheet1.W123:Sheet1.W126 Sheet1.K129:Sheet1.K1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3" table:number-columns-repeated="2"/>
          <table:table-cell table:number-columns-repeated="10"/>
          <table:table-cell table:formula="of:=COM.MICROSOFT.CONCAT(ROUND([.K124];2);&quot;-&quot;;ROUND([.L124];2))" office:value-type="string" office:string-value="6.27-6.31" calcext:value-type="string">
            <text:p>6.27-6.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0.03" calcext:value-type="float">
            <text:p>30.03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25:.E134])" office:value-type="float" office:value="6.27" calcext:value-type="float">
            <text:p>6.27</text:p>
          </table:table-cell>
          <table:table-cell table:style-name="ce53" table:formula="of:=[.K124]+[.$I$125]" office:value-type="float" office:value="6.305" calcext:value-type="float">
            <text:p>6.31</text:p>
          </table:table-cell>
          <table:table-cell table:number-columns-repeated="10"/>
          <table:table-cell table:formula="of:=COM.MICROSOFT.CONCAT(ROUND([.K125];2);&quot;-&quot;;ROUND([.L125];2))" office:value-type="string" office:string-value="6.31-6.34" calcext:value-type="string">
            <text:p>6.31-6.34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7" office:value-type="float" office:value="4.4" calcext:value-type="float">
            <text:p>4.40</text:p>
          </table:table-cell>
          <table:table-cell table:style-name="ce7" office:value-type="float" office:value="6.4" calcext:value-type="float">
            <text:p>6.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25]))" office:value-type="float" office:value="4" calcext:value-type="float">
            <text:p>4</text:p>
          </table:table-cell>
          <table:table-cell table:formula="of:=(MAX([.E125:.E134])-MIN([.E125:.E134]))/[.H125]" office:value-type="float" office:value="0.0350000000000001" calcext:value-type="float">
            <text:p>0.0350000000000001</text:p>
          </table:table-cell>
          <table:table-cell/>
          <table:table-cell table:style-name="ce53" table:formula="of:=[.L124]" office:value-type="float" office:value="6.305" calcext:value-type="float">
            <text:p>6.31</text:p>
          </table:table-cell>
          <table:table-cell table:style-name="ce53" table:formula="of:=[.K125]+[.$I$125]" office:value-type="float" office:value="6.34" calcext:value-type="float">
            <text:p>6.34</text:p>
          </table:table-cell>
          <table:table-cell table:number-columns-repeated="10"/>
          <table:table-cell table:formula="of:=COM.MICROSOFT.CONCAT(ROUND([.K126];2);&quot;-&quot;;ROUND([.L126];2))" office:value-type="string" office:string-value="6.34-6.38" calcext:value-type="string">
            <text:p>6.34-6.3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table:formula="of:=[.L125]" office:value-type="float" office:value="6.34" calcext:value-type="float">
            <text:p>6.34</text:p>
          </table:table-cell>
          <table:table-cell table:style-name="ce53" table:formula="of:=[.K126]+[.$I$125]" office:value-type="float" office:value="6.375" calcext:value-type="float">
            <text:p>6.38</text:p>
          </table:table-cell>
          <table:table-cell table:number-columns-repeated="10"/>
          <table:table-cell table:formula="of:=COM.MICROSOFT.CONCAT(ROUND([.K127];2);&quot;-&quot;;ROUND([.L127];2))" office:value-type="string" office:string-value="6.38-6.41" calcext:value-type="string">
            <text:p>6.38-6.4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6.37" calcext:value-type="float">
            <text:p>6.37</text:p>
          </table:table-cell>
          <table:table-cell table:number-columns-repeated="5"/>
          <table:table-cell table:style-name="ce53" table:formula="of:=[.L126]" office:value-type="float" office:value="6.375" calcext:value-type="float">
            <text:p>6.38</text:p>
          </table:table-cell>
          <table:table-cell table:style-name="ce53" table:formula="of:=[.K127]+[.$I$125]" office:value-type="float" office:value="6.41" calcext:value-type="float">
            <text:p>6.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35" calcext:value-type="float">
            <text:p>6.35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6.32" calcext:value-type="float">
            <text:p>6.32</text:p>
          </table:table-cell>
          <table:table-cell table:number-columns-repeated="5"/>
          <table:table-cell table:style-name="ce53" table:number-matrix-columns-spanned="1" table:number-matrix-rows-spanned="5" table:formula="of:=FREQUENCY([.E125:.E134];[.L124:.L127])" office:value-type="float" office:value="4" calcext:value-type="float">
            <text:p>4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9" calcext:value-type="float">
            <text:p>6.29</text:p>
          </table:table-cell>
          <table:table-cell table:number-columns-repeated="5"/>
          <table:table-cell table:style-name="ce53" office:value-type="float" office:value="1" calcext:value-type="float">
            <text:p>1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41" calcext:value-type="float">
            <text:p>6.41</text:p>
          </table:table-cell>
          <table:table-cell table:number-columns-repeated="5"/>
          <table:table-cell table:style-name="ce53" office:value-type="float" office:value="2" calcext:value-type="float">
            <text:p>2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office:value-type="float" office:value="3" calcext:value-type="float">
            <text:p>3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8" office:value-type="float" office:value="4.46" calcext:value-type="float">
            <text:p>4.46</text:p>
          </table:table-cell>
          <table:table-cell table:style-name="ce8" office:value-type="float" office:value="6.27" calcext:value-type="float">
            <text:p>6.27</text:p>
          </table:table-cell>
          <table:table-cell table:number-columns-repeated="5"/>
          <table:table-cell table:style-name="ce53" office:value-type="float" office:value="0" calcext:value-type="float">
            <text:p>0.00</text:p>
          </table:table-cell>
          <table:table-cell table:style-name="ce53"/>
          <table:table-cell table:number-columns-repeated="1012"/>
        </table:table-row>
        <table:table-row table:style-name="ro1">
          <table:table-cell table:number-columns-repeated="3"/>
          <table:table-cell table:style-name="ce9" office:value-type="float" office:value="4.4" calcext:value-type="float">
            <text:p>4.40</text:p>
          </table:table-cell>
          <table:table-cell table:style-name="ce9" office:value-type="float" office:value="6.41" calcext:value-type="float">
            <text:p>6.41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25:.D134])/10" office:value-type="float" office:value="4.418" calcext:value-type="float">
            <text:p>4.418</text:p>
          </table:table-cell>
          <table:table-cell table:formula="of:=SUM([.E125:.E134])/10" office:value-type="float" office:value="6.336" calcext:value-type="float">
            <text:p>6.336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35]/5" office:value-type="float" office:value="0.8836" calcext:value-type="float">
            <text:p>0.8836</text:p>
          </table:table-cell>
          <table:table-cell table:formula="of:=[.E135]/5" office:value-type="float" office:value="1.2672" calcext:value-type="float">
            <text:p>1.2672</text:p>
          </table:table-cell>
          <table:table-cell table:number-columns-repeated="5"/>
          <table:table-cell table:style-name="ce53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string" calcext:value-type="string">
            <text:p>scarico</text:p>
          </table:table-cell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lintervallo</text:p>
          </table:table-cell>
          <table:table-cell/>
          <table:table-cell table:style-name="ce53" table:formula="of:=MIN([.E144:.E153])" office:value-type="float" office:value="7.24" calcext:value-type="float">
            <text:p>7.24</text:p>
          </table:table-cell>
          <table:table-cell table:style-name="ce53" table:formula="of:=[.K143]+[.$I$144]" office:value-type="float" office:value="7.27" calcext:value-type="float">
            <text:p>7.27</text:p>
          </table:table-cell>
          <table:table-cell table:number-columns-repeated="4"/>
          <table:table-cell>
            <draw:frame draw:z-index="7" draw:style-name="gr1" draw:text-style-name="P1" svg:width="6.2988in" svg:height="3.5429in" svg:x="0.6362in" svg:y="0.0496in">
              <draw:object draw:notify-on-update-of-ranges="Sheet1.AA143:Sheet1.AA146 Sheet1.K148:Sheet1.K1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 table:formula="of:=COM.MICROSOFT.CONCAT(ROUND([.K143];2);&quot;-&quot;;ROUND([.L143];2))" office:value-type="string" office:string-value="7.24-7.27" calcext:value-type="string">
            <text:p>7.24-7.2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7.32" calcext:value-type="float">
            <text:p>7.3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SQRT([.G144]))" office:value-type="float" office:value="4" calcext:value-type="float">
            <text:p>4</text:p>
          </table:table-cell>
          <table:table-cell table:formula="of:=(MAX([.E144:.E153])-MIN([.E144:.E153]))/[.H144]" office:value-type="float" office:value="0.03" calcext:value-type="float">
            <text:p>0.03</text:p>
          </table:table-cell>
          <table:table-cell/>
          <table:table-cell table:style-name="ce53" table:formula="of:=[.L143]" office:value-type="float" office:value="7.27" calcext:value-type="float">
            <text:p>7.27</text:p>
          </table:table-cell>
          <table:table-cell table:style-name="ce53" table:formula="of:=[.K144]+[.$I$144]" office:value-type="float" office:value="7.3" calcext:value-type="float">
            <text:p>7.30</text:p>
          </table:table-cell>
          <table:table-cell table:number-columns-repeated="14"/>
          <table:table-cell table:formula="of:=COM.MICROSOFT.CONCAT(ROUND([.K144];2);&quot;-&quot;;ROUND([.L144];2))" office:value-type="string" office:string-value="7.27-7.3" calcext:value-type="string">
            <text:p>7.27-7.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4" calcext:value-type="float">
            <text:p>7.24</text:p>
          </table:table-cell>
          <table:table-cell table:number-columns-repeated="5"/>
          <table:table-cell table:style-name="ce53" table:formula="of:=[.L144]" office:value-type="float" office:value="7.3" calcext:value-type="float">
            <text:p>7.30</text:p>
          </table:table-cell>
          <table:table-cell table:style-name="ce53" table:formula="of:=[.K145]+[.$I$144]" office:value-type="float" office:value="7.33" calcext:value-type="float">
            <text:p>7.33</text:p>
          </table:table-cell>
          <table:table-cell table:number-columns-repeated="14"/>
          <table:table-cell table:formula="of:=COM.MICROSOFT.CONCAT(ROUND([.K145];2);&quot;-&quot;;ROUND([.L145];2))" office:value-type="string" office:string-value="7.3-7.33" calcext:value-type="string">
            <text:p>7.3-7.3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47" calcext:value-type="float">
            <text:p>4.47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5"/>
          <table:table-cell table:style-name="ce53" table:formula="of:=[.L145]" office:value-type="float" office:value="7.33" calcext:value-type="float">
            <text:p>7.33</text:p>
          </table:table-cell>
          <table:table-cell table:style-name="ce53" table:formula="of:=[.K146]+[.$I$144]" office:value-type="float" office:value="7.36" calcext:value-type="float">
            <text:p>7.36</text:p>
          </table:table-cell>
          <table:table-cell table:number-columns-repeated="14"/>
          <table:table-cell table:formula="of:=COM.MICROSOFT.CONCAT(ROUND([.K146];2);&quot;-&quot;;ROUND([.L146];2))" office:value-type="string" office:string-value="7.33-7.36" calcext:value-type="string">
            <text:p>7.33-7.36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float" office:value="4.41" calcext:value-type="float">
            <text:p>4.41</text:p>
          </table:table-cell>
          <table:table-cell table:style-name="ce8" office:value-type="float" office:value="7.26" calcext:value-type="float">
            <text:p>7.26</text:p>
          </table:table-cell>
          <table:table-cell table:number-columns-repeated="5"/>
          <table:table-cell table:number-matrix-columns-spanned="1" table:number-matrix-rows-spanned="5" table:formula="of:=FREQUENCY([.E144:.E153];[.L143:.L146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5" calcext:value-type="float">
            <text:p>4.35</text:p>
          </table:table-cell>
          <table:table-cell table:style-name="ce8" office:value-type="float" office:value="7.3" calcext:value-type="float">
            <text:p>7.3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6" calcext:value-type="float">
            <text:p>4.36</text:p>
          </table:table-cell>
          <table:table-cell table:style-name="ce8" office:value-type="float" office:value="7.29" calcext:value-type="float">
            <text:p>7.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7.27" calcext:value-type="float">
            <text:p>7.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7.36" calcext:value-type="float">
            <text:p>7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u_medio</text:p>
          </table:table-cell>
          <table:table-cell table:formula="of:=SUM([.D144:.D153])/10" office:value-type="float" office:value="4.398" calcext:value-type="float">
            <text:p>4.398</text:p>
          </table:table-cell>
          <table:table-cell table:formula="of:=SUM([.E144:.E153])/10" office:value-type="float" office:value="7.297" calcext:value-type="float">
            <text:p>7.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iodo_medio</text:p>
          </table:table-cell>
          <table:table-cell table:formula="of:=[.D154]/5" office:value-type="float" office:value="0.8796" calcext:value-type="float">
            <text:p>0.8796</text:p>
          </table:table-cell>
          <table:table-cell table:formula="of:=[.E154]/5" office:value-type="float" office:value="1.4594" calcext:value-type="float">
            <text:p>1.459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bella recap</text:p>
          </table:table-cell>
          <table:table-cell office:value-type="string" calcext:value-type="string">
            <text:p>mi [gr]</text:p>
          </table:table-cell>
          <table:table-cell office:value-type="string" calcext:value-type="string">
            <text:p>Tau_medio</text:p>
          </table:table-cell>
          <table:table-cell table:style-name="ce35" office:value-type="string" calcext:value-type="string" table:number-columns-spanned="2" table:number-rows-spanned="1">
            <text:p>Periodo_medio carico</text:p>
          </table:table-cell>
          <table:covered-table-cell/>
          <table:table-cell table:style-name="ce35" office:value-type="string" calcext:value-type="string" table:number-columns-spanned="2" table:number-rows-spanned="1">
            <text:p>Periodo_medio scarico</text:p>
          </table:table-cell>
          <table:covered-table-cell/>
          <table:table-cell office:value-type="string" calcext:value-type="string">
            <text:p>Ki [N/m]</text:p>
          </table:table-cell>
          <table:table-cell office:value-type="string" calcext:value-type="string">
            <text:p>Errore Tau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 table:formula="of:=[.E78]" office:value-type="float" office:value="4.933" calcext:value-type="float">
            <text:p>4.933</text:p>
          </table:table-cell>
          <table:table-cell table:style-name="ce36" table:formula="of:=[.E79]" office:value-type="float" office:value="0.9866" calcext:value-type="float" table:number-columns-spanned="2" table:number-rows-spanned="1">
            <text:p>0.9866</text:p>
          </table:table-cell>
          <table:covered-table-cell table:style-name="ce36"/>
          <table:table-cell table:style-name="ce36" table:formula="of:=[.D79]" office:value-type="float" office:value="0.8904" calcext:value-type="float" table:number-columns-spanned="2" table:number-rows-spanned="1">
            <text:p>0.8904</text:p>
          </table:table-cell>
          <table:covered-table-cell table:style-name="ce36"/>
          <table:table-cell table:formula="of:=(4*(POWER(PI();2))*[.B161])/((POWER([.D161];2)-POWER([.F161];2)))/1000" office:value-type="float" office:value="1.08661771445818" calcext:value-type="float">
            <text:p>1.08661771445818</text:p>
          </table:table-cell>
          <table:table-cell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table:formula="of:=[.E97]" office:value-type="float" office:value="5.177" calcext:value-type="float">
            <text:p>5.177</text:p>
          </table:table-cell>
          <table:table-cell table:style-name="ce37" table:formula="of:=[.E98]" office:value-type="float" office:value="1.0354" calcext:value-type="float" table:number-columns-spanned="2" table:number-rows-spanned="1">
            <text:p>1.0354</text:p>
          </table:table-cell>
          <table:covered-table-cell table:style-name="ce36"/>
          <table:table-cell table:style-name="ce37" table:formula="of:=[.D98]" office:value-type="float" office:value="0.885" calcext:value-type="float" table:number-columns-spanned="2" table:number-rows-spanned="1">
            <text:p>0.885</text:p>
          </table:table-cell>
          <table:covered-table-cell table:style-name="ce36"/>
          <table:table-cell table:formula="of:=(4*(POWER(PI();2))*[.B162])/((POWER([.D162];2)-POWER([.F162];2)))/1000" office:value-type="float" office:value="1.40785338010283" calcext:value-type="float">
            <text:p>1.40785338010283</text:p>
          </table:table-cell>
          <table:table-cell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E116]" office:value-type="float" office:value="5.854" calcext:value-type="float">
            <text:p>5.854</text:p>
          </table:table-cell>
          <table:table-cell table:style-name="ce36" table:formula="of:=[.E117]" office:value-type="float" office:value="1.1708" calcext:value-type="float" table:number-columns-spanned="2" table:number-rows-spanned="1">
            <text:p>1.1708</text:p>
          </table:table-cell>
          <table:covered-table-cell table:style-name="ce36"/>
          <table:table-cell table:style-name="ce36" table:formula="of:=[.D117]" office:value-type="float" office:value="0.8874" calcext:value-type="float" table:number-columns-spanned="2" table:number-rows-spanned="1">
            <text:p>0.8874</text:p>
          </table:table-cell>
          <table:covered-table-cell table:style-name="ce36"/>
          <table:table-cell table:formula="of:=(4*(POWER(PI();2))*[.B163])/((POWER([.D163];2)-POWER([.F163];2)))/1000" office:value-type="float" office:value="1.35363729872693" calcext:value-type="float">
            <text:p>1.35363729872693</text:p>
          </table:table-cell>
          <table:table-cell office:value-type="float" office:value="0.006" calcext:value-type="float">
            <text:p>0.00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03" calcext:value-type="float">
            <text:p>30.03</text:p>
          </table:table-cell>
          <table:table-cell table:formula="of:=[.E135]" office:value-type="float" office:value="6.336" calcext:value-type="float">
            <text:p>6.336</text:p>
          </table:table-cell>
          <table:table-cell table:style-name="ce36" table:formula="of:=[.E136]" office:value-type="float" office:value="1.2672" calcext:value-type="float" table:number-columns-spanned="2" table:number-rows-spanned="1">
            <text:p>1.2672</text:p>
          </table:table-cell>
          <table:covered-table-cell table:style-name="ce36"/>
          <table:table-cell table:style-name="ce36" table:formula="of:=[.D136]" office:value-type="float" office:value="0.8836" calcext:value-type="float" table:number-columns-spanned="2" table:number-rows-spanned="1">
            <text:p>0.8836</text:p>
          </table:table-cell>
          <table:covered-table-cell table:style-name="ce36"/>
          <table:table-cell table:formula="of:=(4*(POWER(PI();2))*[.B164])/((POWER([.D164];2)-POWER([.F164];2)))/1000" office:value-type="float" office:value="1.43693274818378" calcext:value-type="float">
            <text:p>1.43693274818378</text:p>
          </table:table-cell>
          <table:table-cell office:value-type="float" office:value="0.004" calcext:value-type="float">
            <text:p>0.00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table:formula="of:=[.E154]" office:value-type="float" office:value="7.297" calcext:value-type="float">
            <text:p>7.297</text:p>
          </table:table-cell>
          <table:table-cell table:style-name="ce36" table:formula="of:=[.E155]" office:value-type="float" office:value="1.4594" calcext:value-type="float" table:number-columns-spanned="2" table:number-rows-spanned="1">
            <text:p>1.4594</text:p>
          </table:table-cell>
          <table:covered-table-cell table:style-name="ce36"/>
          <table:table-cell table:style-name="ce36" table:formula="of:=[.D155]" office:value-type="float" office:value="0.8796" calcext:value-type="float" table:number-columns-spanned="2" table:number-rows-spanned="1">
            <text:p>0.8796</text:p>
          </table:table-cell>
          <table:covered-table-cell table:style-name="ce36"/>
          <table:table-cell table:formula="of:=(4*(POWER(PI();2))*[.B165])/((POWER([.D165];2)-POWER([.F165];2)))/1000" office:value-type="float" office:value="1.45523938687843" calcext:value-type="float">
            <text:p>1.45523938687843</text:p>
          </table:table-cell>
          <table:table-cell office:value-type="float" office:value="0.002" calcext:value-type="float">
            <text:p>0.00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eriodi^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POWER([.D161];2)" office:value-type="float" office:value="0.97337956" calcext:value-type="float">
            <text:p>0.9733795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POWER([.D162];2)" office:value-type="float" office:value="1.07205316" calcext:value-type="float">
            <text:p>1.072053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POWER([.D163];2)" office:value-type="float" office:value="1.37077264" calcext:value-type="float">
            <text:p>1.3707726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POWER([.D164];2)" office:value-type="float" office:value="1.60579584" calcext:value-type="float">
            <text:p>1.6057958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POWER([.D165];2)" office:value-type="float" office:value="2.12984836" calcext:value-type="float">
            <text:p>2.12984836</text:p>
          </table:table-cell>
          <table:table-cell table:number-columns-repeated="1020"/>
        </table:table-row>
        <table:table-row table:style-name="ro1" table:number-rows-repeated="82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5">00/00/0000</text:date>, <text:time style:data-style-name="N2" text:time-value="13:58:41.546389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25T14:01:49.445176685</dc:date>
    <meta:editing-duration>PT1H9M32S</meta:editing-duration>
    <meta:editing-cycles>11</meta:editing-cycles>
    <meta:document-statistic meta:table-count="1" meta:cell-count="580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06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H48:Sheet1.H52" chart:error-lower-range="Sheet1.H48:Sheet1.H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H48:Sheet1.H52" chart:error-lower-range="Sheet1.H48:Sheet1.H5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13cm" svg:height="9.964cm" xlink:href=".." xlink:type="simple" chart:class="chart:scatter" chart:style-name="ch1">
        <chart:title svg:x="7.648cm" svg:y="0.335cm" chart:style-name="ch2">
          <text:p>k_i v.s. m_i</text:p>
        </chart:title>
        <chart:plot-area chart:style-name="ch3" table:cell-range-address="Sheet1.C48:Sheet1.C52 Sheet1.G48:Sheet1.G52 Sheet1.L59:Sheet1.L60" svg:x="0.354cm" svg:y="1.313cm" svg:width="17.005cm" svg:height="8.452cm">
          <chart:coordinate-region svg:x="1.266cm" svg:y="1.512cm" svg:width="15.761cm" svg:height="7.60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G48:Sheet1.G52" chart:class="chart:scatter">
            <chart:domain table:cell-range-address="Sheet1.C48:Sheet1.C52"/>
            <chart:error-indicator chart:style-name="ch9" chart:dimension="y"/>
            <chart:data-point chart:repeated="5"/>
          </chart:series>
          <chart:series chart:style-name="ch10" chart:values-cell-range-address="Sheet1.L59:Sheet1.L60" chart:class="chart:scatter">
            <chart:domain table:cell-range-address="Sheet1.K59:Sheet1.K6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7">
                <text:p>0.00497</text:p>
                <draw:g>
                  <svg:desc>Sheet1.C48:Sheet1.C52</svg:desc>
                </draw:g>
              </table:table-cell>
              <table:table-cell office:value-type="float" office:value="1.47744545454545">
                <text:p>1.47744545454545</text:p>
                <draw:g>
                  <svg:desc>Sheet1.G48:Sheet1.G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.0477438016528925">
                <text:p>0.0477438016528925</text:p>
                <draw:g>
                  <svg:desc>Sheet1.H48:Sheet1.H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.487">
                <text:p>1.487</text:p>
                <draw:g>
                  <svg:desc>Sheet1.L59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3">
                <text:p>0.0103</text:p>
              </table:table-cell>
              <table:table-cell office:value-type="float" office:value="1.55450769230769">
                <text:p>1.55450769230769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0.0254247337278107">
                <text:p>0.0254247337278107</text:p>
              </table:table-cell>
              <table:table-cell office:value-type="float" office:value="100">
                <text:p>100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48636363636364">
                <text:p>1.48636363636364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0.0120035123966942">
                <text:p>0.012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3">
                <text:p>0.03003</text:p>
              </table:table-cell>
              <table:table-cell office:value-type="float" office:value="1.48037336683417">
                <text:p>1.48037336683417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0.00793202696901594">
                <text:p>0.007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99">
                <text:p>0.04999</text:p>
              </table:table-cell>
              <table:table-cell office:value-type="float" office:value="1.49058328267477">
                <text:p>1.49058328267477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0.00482882456740053">
                <text:p>0.004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range="Sheet1.I161:Sheet1.I165" chart:error-lower-range="Sheet1.I161:Sheet1.I165">
        <chart:symbol-image xlink:href="Pictures/2000000E000000DF000000DFBD62C733.svm"/>
      </style:chart-properties>
    </style:style>
    <style:style style:name="ch4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upper-range="Sheet1.I161:Sheet1.I165" chart:error-lower-range="Sheet1.I161:Sheet1.I16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>
      <style:chart-properties chart:solid-type="cuboid" chart:symbol-type="named-symbol" chart:symbol-name="x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Dipendenza periodo medio / massa</text:p>
        </chart:title>
        <chart:plot-area chart:style-name="ch3" table:cell-range-address="Sheet1.B161:Sheet1.B165 Sheet1.D167:Sheet1.D171" svg:x="1.331cm" svg:y="1.275cm" svg:width="14.349cm" svg:height="6.564cm">
          <chart:coordinate-region svg:x="2.058cm" svg:y="1.474cm" svg:width="13.436cm" svg:height="5.718cm"/>
          <chart:axis chart:dimension="x" chart:name="primary-x" chart:style-name="ch4">
            <chart:title svg:x="7.971cm" svg:y="8.019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249cm" chart:style-name="ch9">
              <text:p>𝑇^2 [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D167:Sheet1.D171" chart:class="chart:scatter">
            <chart:domain table:cell-range-address="Sheet1.B161:Sheet1.B165"/>
            <chart:regression-curve chart:style-name="ch11"/>
            <chart:data-point chart:repeated="3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B161:Sheet1.B165</svg:desc>
                </draw:g>
              </table:table-cell>
              <table:table-cell office:value-type="float" office:value="0.97337956">
                <text:p>0.97337956</text:p>
                <draw:g>
                  <svg:desc>Sheet1.D167:Sheet1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.07205316">
                <text:p>1.07205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37077264">
                <text:p>1.37077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.60579584">
                <text:p>1.60579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2.12984836">
                <text:p>2.12984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" chart:origin="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1cm" svg:height="10.144cm" xlink:href=".." xlink:type="simple" chart:class="chart:scatter" chart:style-name="ch1">
        <chart:title svg:x="8.393cm" svg:y="0.029cm" chart:style-name="ch2">
          <text:p>l_i vs m_i</text:p>
        </chart:title>
        <chart:plot-area chart:style-name="ch3" table:cell-range-address="Sheet1.D48:Sheet1.E52" svg:x="0.702cm" svg:y="1.035cm" svg:width="17.746cm" svg:height="8.655cm">
          <chart:coordinate-region svg:x="1.323cm" svg:y="1.235cm" svg:width="17.125cm" svg:height="7.808cm"/>
          <chart:axis chart:dimension="x" chart:name="primary-x" chart:style-name="ch4">
            <chart:title svg:x="7.993cm" svg:y="9.365cm" chart:style-name="ch2">
              <text:p>m_i [cm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02cm" svg:y="5.385cm" chart:style-name="ch8">
              <text:p>l_i [g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E48:Sheet1.E52" chart:class="chart:scatter">
            <chart:domain table:cell-range-address="Sheet1.D48:Sheet1.D52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35.7">
                <text:p>35.7</text:p>
                <draw:g>
                  <svg:desc>Sheet1.E48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65.3">
                <text:p>6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 chart:error-category="cell-range" chart:error-upper-range="Sheet1.A48:Sheet1.A52" chart:error-lower-range="Sheet1.A48:Sheet1.A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A48:Sheet1.A52" chart:error-lower-range="Sheet1.A48:Sheet1.A5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x" chart:symbol-width="0.15cm" chart:symbol-height="0.15cm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73cm" svg:height="10.447cm" xlink:href=".." xlink:type="simple" chart:class="chart:scatter" chart:style-name="ch1">
        <chart:title svg:x="8.211cm" svg:y="0.344cm" chart:style-name="ch2">
          <text:p>k_i vs m_i</text:p>
        </chart:title>
        <chart:plot-area chart:style-name="ch3" table:cell-range-address="Sheet1.D48:Sheet1.D52 Sheet1.B48:Sheet1.B52 Sheet1.M59:Sheet1.M60" svg:x="1.478cm" svg:y="1.188cm" svg:width="16.819cm" svg:height="7.927cm">
          <chart:coordinate-region svg:x="2.47cm" svg:y="1.387cm" svg:width="15.64cm" svg:height="7.081cm"/>
          <chart:axis chart:dimension="x" chart:name="primary-x" chart:style-name="ch4">
            <chart:title svg:x="8.985cm" svg:y="9.216cm" chart:style-name="ch5">
              <text:p>m_i [g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328cm" svg:y="6.24cm" chart:style-name="ch9">
              <text:p>k_i [g/s^2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48:Sheet1.B52" chart:class="chart:scatter">
            <chart:domain table:cell-range-address="Sheet1.D48:Sheet1.D52"/>
            <chart:error-indicator chart:style-name="ch11" chart:dimension="y"/>
            <chart:data-point/>
            <chart:data-point chart:style-name="ch12"/>
            <chart:data-point chart:repeated="3"/>
          </chart:series>
          <chart:series chart:style-name="ch13" chart:values-cell-range-address="Sheet1.M59:Sheet1.M60" chart:class="chart:scatter">
            <chart:domain table:cell-range-address="Sheet1.K59:Sheet1.K60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7">
                <text:p>4.97</text:p>
                <draw:g>
                  <svg:desc>Sheet1.D48:Sheet1.D52</svg:desc>
                </draw:g>
              </table:table-cell>
              <table:table-cell office:value-type="float" office:value="1477.44545454545">
                <text:p>1477.44545454545</text:p>
                <draw:g>
                  <svg:desc>Sheet1.B48:Sheet1.B52</svg:desc>
                </draw:g>
              </table:table-cell>
              <table:table-cell office:value-type="float" office:value="47.7438016528925">
                <text:p>47.7438016528925</text:p>
                <draw:g>
                  <svg:desc>Sheet1.A48:Sheet1.A52</svg:desc>
                </draw:g>
              </table:table-cell>
              <table:table-cell office:value-type="float" office:value="47.7438016528925">
                <text:p>47.7438016528925</text:p>
                <draw:g>
                  <svg:desc>Sheet1.A48:Sheet1.A52</svg:desc>
                </draw:g>
              </table:table-cell>
              <table:table-cell office:value-type="float" office:value="0">
                <text:p>0</text:p>
                <draw:g>
                  <svg:desc>Sheet1.K59:Sheet1.K60</svg:desc>
                </draw:g>
              </table:table-cell>
              <table:table-cell office:value-type="float" office:value="1487">
                <text:p>1487</text:p>
                <draw:g>
                  <svg:desc>Sheet1.M59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1554.50769230769">
                <text:p>1554.50769230769</text:p>
              </table:table-cell>
              <table:table-cell office:value-type="float" office:value="25.4247337278107">
                <text:p>25.4247337278107</text:p>
              </table:table-cell>
              <table:table-cell office:value-type="float" office:value="25.4247337278107">
                <text:p>25.4247337278107</text:p>
              </table:table-cell>
              <table:table-cell office:value-type="float" office:value="100">
                <text:p>10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86.36363636364">
                <text:p>1486.36363636364</text:p>
              </table:table-cell>
              <table:table-cell office:value-type="float" office:value="12.0035123966942">
                <text:p>12.0035123966942</text:p>
              </table:table-cell>
              <table:table-cell office:value-type="float" office:value="12.0035123966942">
                <text:p>12.003512396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3">
                <text:p>30.03</text:p>
              </table:table-cell>
              <table:table-cell office:value-type="float" office:value="1480.37336683417">
                <text:p>1480.37336683417</text:p>
              </table:table-cell>
              <table:table-cell office:value-type="float" office:value="7.93202696901594">
                <text:p>7.93202696901594</text:p>
              </table:table-cell>
              <table:table-cell office:value-type="float" office:value="7.93202696901594">
                <text:p>7.932026969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">
                <text:p>49.99</text:p>
              </table:table-cell>
              <table:table-cell office:value-type="float" office:value="1490.58328267477">
                <text:p>1490.58328267477</text:p>
              </table:table-cell>
              <table:table-cell office:value-type="float" office:value="4.82882456740053">
                <text:p>4.82882456740053</text:p>
              </table:table-cell>
              <table:table-cell office:value-type="float" office:value="4.82882456740053">
                <text:p>4.828824567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66:Sheet1.W69 Sheet1.K72:Sheet1.K75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auto">
            <chartooo:date-scale/>
            <chart:categories table:cell-range-address="Sheet1.W66:Sheet1.W69"/>
          </chart:axis>
          <chart:axis chart:dimension="y" chart:name="primary-y" chart:style-name="ch5"/>
          <chart:series chart:style-name="ch6" chart:values-cell-range-address="Sheet1.K72:Sheet1.K75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4.83-4.89</text:p>
                <draw:g>
                  <svg:desc>Sheet1.W66:Sheet1.W69</svg:desc>
                </draw:g>
              </table:table-cell>
              <table:table-cell office:value-type="float" office:value="3">
                <text:p>3</text:p>
                <draw:g>
                  <svg:desc>Sheet1.K72:Sheet1.K75</svg:desc>
                </draw:g>
              </table:table-cell>
            </table:table-row>
            <table:table-row>
              <table:table-cell office:value-type="string">
                <text:p>4.89-4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.95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-5.0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85:Sheet1.W88 Sheet1.K91:Sheet1.K94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85:Sheet1.W88"/>
          </chart:axis>
          <chart:axis chart:dimension="y" chart:name="primary-y" chart:style-name="ch5"/>
          <chart:series chart:style-name="ch6" chart:values-cell-range-address="Sheet1.K91:Sheet1.K94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5.06-5.13</text:p>
                <draw:g>
                  <svg:desc>Sheet1.W85:Sheet1.W88</svg:desc>
                </draw:g>
              </table:table-cell>
              <table:table-cell office:value-type="float" office:value="3">
                <text:p>3</text:p>
                <draw:g>
                  <svg:desc>Sheet1.K91:Sheet1.K94</svg:desc>
                </draw:g>
              </table:table-cell>
            </table:table-row>
            <table:table-row>
              <table:table-cell office:value-type="string">
                <text:p>5.13-5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21-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28-5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104:Sheet1.W107 Sheet1.K110:Sheet1.K113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104:Sheet1.W107"/>
          </chart:axis>
          <chart:axis chart:dimension="y" chart:name="primary-y" chart:style-name="ch5"/>
          <chart:series chart:style-name="ch6" chart:values-cell-range-address="Sheet1.K110:Sheet1.K113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5.72-5.79</text:p>
                <draw:g>
                  <svg:desc>Sheet1.W104:Sheet1.W107</svg:desc>
                </draw:g>
              </table:table-cell>
              <table:table-cell office:value-type="float" office:value="3">
                <text:p>3</text:p>
                <draw:g>
                  <svg:desc>Sheet1.K110:Sheet1.K113</svg:desc>
                </draw:g>
              </table:table-cell>
            </table:table-row>
            <table:table-row>
              <table:table-cell office:value-type="string">
                <text:p>5.79-5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86-5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93-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W123:Sheet1.W126 Sheet1.K129:Sheet1.K132" chart:data-source-has-labels="column" svg:x="-0.135cm" svg:y="1.339cm" svg:width="15.835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W123:Sheet1.W126"/>
          </chart:axis>
          <chart:axis chart:dimension="y" chart:name="primary-y" chart:style-name="ch5"/>
          <chart:series chart:style-name="ch6" chart:values-cell-range-address="Sheet1.K129:Sheet1.K132" chart:class="chart:bar">
            <chart:data-point chart:style-name="ch7" chart:repeated="2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6.27-6.31</text:p>
                <draw:g>
                  <svg:desc>Sheet1.W123:Sheet1.W126</svg:desc>
                </draw:g>
              </table:table-cell>
              <table:table-cell office:value-type="float" office:value="4">
                <text:p>4</text:p>
                <draw:g>
                  <svg:desc>Sheet1.K129:Sheet1.K132</svg:desc>
                </draw:g>
              </table:table-cell>
            </table:table-row>
            <table:table-row>
              <table:table-cell office:value-type="string">
                <text:p>6.31-6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.34-6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.38-6.4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25cm" svg:stroke-color="#ffffff" draw:fill-color="#66666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Istogramma di 10 𝜏</text:p>
        </chart:title>
        <chart:plot-area chart:style-name="ch3" table:cell-range-address="Sheet1.AA143:Sheet1.AA146 Sheet1.K148:Sheet1.K151" chart:data-source-has-labels="column" svg:x="0.341cm" svg:y="1.339cm" svg:width="15.359cm" svg:height="7.544cm">
          <chart:coordinate-region svg:x="0.777cm" svg:y="1.538cm" svg:width="14.923cm" svg:height="6.698cm"/>
          <chart:axis chart:dimension="x" chart:name="primary-x" chart:style-name="ch4" chartooo:axis-type="text">
            <chart:categories table:cell-range-address="Sheet1.AA143:Sheet1.AA146"/>
          </chart:axis>
          <chart:axis chart:dimension="y" chart:name="primary-y" chart:style-name="ch5"/>
          <chart:series chart:style-name="ch6" chart:values-cell-range-address="Sheet1.K148:Sheet1.K151" chart:class="chart:bar"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7.24-7.27</text:p>
                <draw:g>
                  <svg:desc>Sheet1.AA143:Sheet1.AA146</svg:desc>
                </draw:g>
              </table:table-cell>
              <table:table-cell office:value-type="float" office:value="3">
                <text:p>3</text:p>
                <draw:g>
                  <svg:desc>Sheet1.K148:Sheet1.K151</svg:desc>
                </draw:g>
              </table:table-cell>
            </table:table-row>
            <table:table-row>
              <table:table-cell office:value-type="string">
                <text:p>7.27-7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3-7.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33-7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